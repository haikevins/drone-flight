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.0201in" fo:margin-bottom="0.0201in" style:contextual-spacing="false" fo:text-indent="0in" style:auto-text-indent="false"/>
    </style:style>
    <style:style style:name="P2" style:family="paragraph" style:parent-style-name="Preformatted_20_Text">
      <style:paragraph-properties fo:margin-top="0.0201in" fo:margin-bottom="0.0201in" style:contextual-spacing="false"/>
    </style:style>
    <style:style style:name="P3" style:family="paragraph" style:parent-style-name="Text_20_body">
      <style:paragraph-properties fo:margin-top="0.0201in" fo:margin-bottom="0.0201in" style:contextual-spacing="false"/>
    </style:style>
    <style:style style:name="P4" style:family="paragraph" style:parent-style-name="Text_20_body">
      <style:paragraph-properties fo:margin-top="0.0201in" fo:margin-bottom="0.0201in" style:contextual-spacing="false"/>
      <style:text-properties style:font-name="Liberation Serif" fo:font-size="13pt" style:font-size-asian="13pt" style:font-size-complex="13pt"/>
    </style:style>
    <style:style style:name="P5" style:family="paragraph" style:parent-style-name="Standard">
      <style:paragraph-properties fo:margin-top="0.0201in" fo:margin-bottom="0.0201in" style:contextual-spacing="false"/>
      <style:text-properties style:font-name="Liberation Serif" fo:font-size="13pt" officeooo:rsid="00110132" officeooo:paragraph-rsid="00110132" style:font-size-asian="13pt" style:font-size-complex="13pt"/>
    </style:style>
    <style:style style:name="P6" style:family="paragraph" style:parent-style-name="Standard">
      <style:paragraph-properties fo:margin-top="0.0201in" fo:margin-bottom="0.0201in" style:contextual-spacing="false"/>
      <style:text-properties style:font-name="Liberation Serif" fo:font-size="13pt" officeooo:rsid="00162c35" officeooo:paragraph-rsid="0017bd1e" style:font-size-asian="13pt" style:font-size-complex="13pt"/>
    </style:style>
    <style:style style:name="P7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officeooo:rsid="00190106" officeooo:paragraph-rsid="00190106" style:font-size-asian="13pt" style:font-weight-asian="normal" style:font-size-complex="13pt" style:font-weight-complex="normal"/>
    </style:style>
    <style:style style:name="P8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normal" officeooo:paragraph-rsid="0036c29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110132" officeooo:paragraph-rsid="00110132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12ca60" officeooo:paragraph-rsid="0012ca60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190106" officeooo:paragraph-rsid="00190106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3681dc" officeooo:paragraph-rsid="003681dc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36c297" officeooo:paragraph-rsid="0036c297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top="0.0201in" fo:margin-bottom="0.0201in" style:contextual-spacing="false"/>
      <style:text-properties officeooo:paragraph-rsid="0036c297"/>
    </style:style>
    <style:style style:name="P16" style:family="paragraph" style:parent-style-name="Standard">
      <style:paragraph-properties fo:margin-top="0.0201in" fo:margin-bottom="0.0201in" style:contextual-spacing="false"/>
      <style:text-properties style:font-name="Liberation Serif" fo:font-size="13pt" officeooo:rsid="003a086e" officeooo:paragraph-rsid="0036c297" style:font-size-asian="13pt" style:font-size-complex="13pt"/>
    </style:style>
    <style:style style:name="T1" style:family="text">
      <style:text-properties officeooo:rsid="001e1d3c"/>
    </style:style>
    <style:style style:name="T2" style:family="text">
      <style:text-properties officeooo:rsid="0027f7da"/>
    </style:style>
    <style:style style:name="T3" style:family="text">
      <style:text-properties style:font-name="Liberation Serif" fo:font-size="13pt" style:font-size-asian="13pt" style:font-size-complex="13pt"/>
    </style:style>
    <style:style style:name="T4" style:family="text">
      <style:text-properties style:font-name="Liberation Serif" fo:font-size="13pt" officeooo:rsid="003a086e" style:font-size-asian="13pt" style:font-size-complex="13pt"/>
    </style:style>
    <style:style style:name="T5" style:family="text">
      <style:text-properties style:font-name="Liberation Serif" fo:font-size="13pt" officeooo:rsid="003fed52" style:font-size-asian="13pt" style:font-size-complex="13pt"/>
    </style:style>
    <style:style style:name="T6" style:family="text">
      <style:text-properties style:font-name="Liberation Serif" fo:font-size="13pt" officeooo:rsid="00419c6f" style:font-size-asian="13pt" style:font-size-complex="13pt"/>
    </style:style>
    <style:style style:name="T7" style:family="text">
      <style:text-properties style:font-name="Liberation Serif" fo:font-size="13pt" officeooo:rsid="0044776b" style:font-size-asian="13pt" style:font-size-complex="13pt"/>
    </style:style>
    <style:style style:name="T8" style:family="text">
      <style:text-properties style:font-name="Liberation Serif" fo:font-size="13pt" officeooo:rsid="0045aa96" style:font-size-asian="13pt" style:font-size-complex="13pt"/>
    </style:style>
    <style:style style:name="T9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6c297"/>
    </style:style>
    <style:style style:name="T12" style:family="text">
      <style:text-properties officeooo:rsid="003fed52"/>
    </style:style>
    <style:style style:name="T13" style:family="text">
      <style:text-properties officeooo:rsid="0044776b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 Hệ trục X-quad</text:p>
      <text:p text:style-name="P5">M1 = front-left</text:p>
      <text:p text:style-name="P5">M2 = front-right</text:p>
      <text:p text:style-name="P5">M3 = rear-right</text:p>
      <text:p text:style-name="P5">M4 = rear-left</text:p>
      <text:p text:style-name="P10">2. Cánh test</text:p>
      <text:p text:style-name="P5">M1 front-left <text:s text:c="2"/>= CW</text:p>
      <text:p text:style-name="P5">M2 front-right <text:s/>= CCW</text:p>
      <text:p text:style-name="P5">M3 rear-right <text:s text:c="2"/>= CW</text:p>
      <text:p text:style-name="P5">M4 rear-left <text:s text:c="3"/>= CCW</text:p>
      <text:p text:style-name="P11">3. IMU và Madgwick test</text:p>
      <text:p text:style-name="P6">Level / +Z up:</text:p>
      <text:p text:style-name="P6">ax=0.01 ay=-0.02 az=1.00 <text:s/>→ đúng, gần (0, 0, +1)</text:p>
      <text:p text:style-name="P6">Upside down / -Z up:</text:p>
      <text:p text:style-name="P6">ax=-0.03 ay=0.01 az=-0.99 → đúng, gần (0, 0, -1)</text:p>
      <text:p text:style-name="P6">Front ngẩng lên / +X up:</text:p>
      <text:p text:style-name="P6">ax=0.99 ay=0.01 az=0.03 → đúng, gần (+1, 0, 0) → gy âm → pitch âm</text:p>
      <text:p text:style-name="P6">Front chúi xuống / -X up:</text:p>
      <text:p text:style-name="P6">ax=-1.01 ay=0.02 az=-0.01 → đúng, gần (-1, 0, 0) → gy dương → pitch dương</text:p>
      <text:p text:style-name="P6">Nghiêng sang phải / +Y up:</text:p>
      <text:p text:style-name="P6">ax=0.00 ay=0.98 az=0.04 → đúng, gần (0, +1, 0) <text:span text:style-name="T1">0 → gx dương → roll dương</text:span></text:p>
      <text:p text:style-name="P6">Nghiêng sang trái / -Y up:</text:p>
      <text:p text:style-name="P6">ax=0.02 ay=-1.00 az=0.01 → đúng, gần (0, -1, 0) → gx âm → roll âm</text:p>
      <text:p text:style-name="P6">Nhìn từ trên xuống:</text:p>
      <text:p text:style-name="P6">xoay ngược chiều kim đồng hồ / yaw left <text:s/>→ gz dương → yaw dương</text:p>
      <text:p text:style-name="P6">xoay cùng chiều kim đồng hồ / yaw right <text:s/>→ gz âm → yaw âm</text:p>
      <text:p text:style-name="P12">4. <text:span text:style-name="T2">Output pid test</text:span></text:p>
      <text:h text:style-name="P7" text:outline-level="2"><text:span text:style-name="T10">Bước 1</text:span>: chỉ test roll</text:h>
      <text:p text:style-name="P4">Tạm thời để:</text:p>
      <text:section text:style-name="Sect1" text:name="code-block-viewer">
        <text:p text:style-name="P1"><text:span text:style-name="Source_20_Text"><text:span text:style-name="T3">pitch_output = 0;</text:span></text:span></text:p>
        <text:p text:style-name="P2"><text:span text:style-name="Source_20_Text"><text:span text:style-name="T3">yaw_output <text:s text:c="2"/>= 0;</text:span></text:span></text:p>
      </text:section>
      <text:p text:style-name="P4">Mixer chỉ còn:</text:p>
      <text:p text:style-name="P4">Tháo cánh, nghiêng drone sang phải.</text:p>
      <text:p text:style-name="P4">Đúng phải là:</text:p>
      <text:section text:style-name="Sect1" text:name="Section2">
        <text:p text:style-name="P1"><text:bookmark text:name="code-block-viewer Copy 1"/><text:span text:style-name="Source_20_Text"><text:span text:style-name="T3">M2, M3 tăng</text:span></text:span></text:p>
        <text:p text:style-name="P2"><text:span text:style-name="Source_20_Text"><text:span text:style-name="T3">M1, M4 giảm</text:span></text:span></text:p>
      </text:section>
      <text:p text:style-name="P3"><text:span text:style-name="T3">Nếu ngược lại, đảo dấu </text:span><text:span text:style-name="Source_20_Text"><text:span text:style-name="T3">roll_output</text:span></text:span><text:span text:style-name="T3"> hoặc đảo dấu roll trong mixer.</text:span></text:p>
      <text:h text:style-name="P8" text:outline-level="2"><text:soft-page-break/><text:span text:style-name="T10">Bước 2</text:span>: thêm pitch</text:h>
      <text:p text:style-name="P4">Khi roll đã đúng, thêm pitch.</text:p>
      <text:p text:style-name="P4">Chúc mũi drone xuống.</text:p>
      <text:p text:style-name="P4">Đúng phải là:</text:p>
      <text:section text:style-name="Sect1" text:name="Section4">
        <text:p text:style-name="P1"><text:bookmark text:name="code-block-viewer Copy 3"/><text:span text:style-name="Source_20_Text"><text:span text:style-name="T3">M1, M2 tăng</text:span></text:span></text:p>
        <text:p text:style-name="P2"><text:span text:style-name="Source_20_Text"><text:span text:style-name="T3">M3, M4 giảm</text:span></text:span></text:p>
      </text:section>
      <text:p text:style-name="P3"><text:span text:style-name="T3">Nếu ngược lại, đảo dấu </text:span><text:span text:style-name="Source_20_Text"><text:span text:style-name="T3">pitch_output</text:span></text:span><text:span text:style-name="T3"> hoặc đảo dấu pitch trong mixer.</text:span></text:p>
      <text:h text:style-name="P8" text:outline-level="2"><text:span text:style-name="T10">Bước 3</text:span>: thêm yaw</text:h>
      <text:p text:style-name="P4">Khi roll và pitch đã đúng, thêm yaw.</text:p>
      <text:p text:style-name="P4">Yaw phải, với layout của bạn:</text:p>
      <text:section text:style-name="Sect1" text:name="Section6">
        <text:p text:style-name="P1"><text:bookmark text:name="code-block-viewer Copy 5"/><text:span text:style-name="Source_20_Text"><text:span text:style-name="T3">M1 CW</text:span></text:span></text:p>
        <text:p text:style-name="P2"><text:span text:style-name="Source_20_Text"><text:span text:style-name="T3">M2 CCW</text:span></text:span></text:p>
        <text:p text:style-name="P2"><text:span text:style-name="Source_20_Text"><text:span text:style-name="T3">M3 CW</text:span></text:span></text:p>
        <text:p text:style-name="P2"><text:span text:style-name="Source_20_Text"><text:span text:style-name="T3">M4 CCW</text:span></text:span></text:p>
      </text:section>
      <text:p text:style-name="P4">Đúng phải là:</text:p>
      <text:section text:style-name="Sect1" text:name="Section7">
        <text:p text:style-name="P1"><text:bookmark text:name="code-block-viewer Copy 6"/><text:span text:style-name="Source_20_Text"><text:span text:style-name="T3">M2, M4 tăng</text:span></text:span></text:p>
        <text:p text:style-name="P2"><text:span text:style-name="Source_20_Text"><text:span text:style-name="T3">M1, M3 giảm</text:span></text:span></text:p>
      </text:section>
      <text:p text:style-name="P3"><text:span text:style-name="T3">Nếu ngược lại, đảo dấu </text:span><text:span text:style-name="Source_20_Text"><text:span text:style-name="T3">yaw_output</text:span></text:span><text:span text:style-name="T3"> hoặc đảo dấu yaw trong mixer.</text:span></text:p>
      <text:p text:style-name="P13">5. FFT test</text:p>
      <text:p text:style-name="P14">6. Nâng cấp</text:p>
      <text:p text:style-name="P9"><text:span text:style-name="T11">- a</text:span>uto-calibrate gyro bias khi drone thật sự đứng yên <text:span text:style-name="T12">| chưa thêm</text:span></text:p>
      <text:p text:style-name="P15"><text:span text:style-name="T9">- d</text:span><text:span text:style-name="T3">ùng điều kiện </text:span><text:span text:style-name="Source_20_Text"><text:span text:style-name="T3">landed</text:span></text:span><text:span text:style-name="T3"> dựa trên motor + accel norm </text:span><text:span text:style-name="T5">| chưa thêm</text:span></text:p>
      <text:p text:style-name="P15"><text:span text:style-name="T3">- calibration accel 6 mặt + đổi về range nhạy hơn khi calibrate </text:span><text:span text:style-name="T6">| </text:span><text:span text:style-name="T4">có rồi nhưng chưa chuẩn theo flix</text:span></text:p>
      <text:p text:style-name="P16">- LPF có init/reset để tránh ramp từ 0 <text:span text:style-name="T13">| chưa thêm</text:span></text:p>
      <text:p text:style-name="P15"><text:span text:style-name="T4">- Không dùng accel quá mạnh khi đang bay </text:span><text:span text:style-name="T7">| có rồ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2:25:01.046513181</meta:creation-date>
    <dc:date>2026-06-18T18:05:07.067109505</dc:date>
    <meta:editing-duration>PT4H23M28S</meta:editing-duration>
    <meta:editing-cycles>50</meta:editing-cycles>
    <meta:generator>LibreOffice/24.2.7.2$Linux_X86_64 LibreOffice_project/420$Build-2</meta:generator>
    <meta:document-statistic meta:table-count="0" meta:image-count="0" meta:object-count="0" meta:page-count="2" meta:paragraph-count="62" meta:word-count="394" meta:character-count="1792" meta:non-whitespace-character-count="1447"/>
  </office:meta>
</office:document-meta>
</file>